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Automation Template Task</text:p>
      <text:p text:style-name="P1"><text:span text:style-name="Source_20_Text">This section presents a reusable configuration template for the PCs used in the network. The same structure is applied to all PCs, with only the device name and IP address changed.</text:span></text:p>
      <text:p text:style-name="P1"><text:span text:style-name="Source_20_Text"/></text:p>
      <text:p text:style-name="P1"><text:span text:style-name="Source_20_Text">Standard PC Configuration Template</text:span></text:p>
      <text:p text:style-name="P1"><text:span text:style-name="Source_20_Text"/></text:p>
      <text:p text:style-name="P1"><text:span text:style-name="Source_20_Text">Device Name: PC1</text:span></text:p>
      <text:p text:style-name="P1"><text:span text:style-name="Source_20_Text">IP Address: 192.168.1.10</text:span></text:p>
      <text:p text:style-name="P1"><text:span text:style-name="Source_20_Text">Subnet Mask: 255.255.255.0</text:span></text:p>
      <text:p text:style-name="P1"><text:span text:style-name="Source_20_Text">Default Gateway: 192.168.1.1</text:span></text:p>
      <text:p text:style-name="P1"><text:span text:style-name="Source_20_Text"/></text:p>
      <text:p text:style-name="P1"><text:span text:style-name="Source_20_Text">Device Name: PC2</text:span></text:p>
      <text:p text:style-name="P1"><text:span text:style-name="Source_20_Text">IP Address: 192.168.1.11</text:span></text:p>
      <text:p text:style-name="P1"><text:span text:style-name="Source_20_Text">Subnet Mask: 255.255.255.0</text:span></text:p>
      <text:p text:style-name="P1"><text:span text:style-name="Source_20_Text">Default Gateway: 192.168.1.1</text:span></text:p>
      <text:p text:style-name="P1"><text:span text:style-name="Source_20_Text"/></text:p>
      <text:p text:style-name="P1"><text:span text:style-name="Source_20_Text"/></text:p>
      <text:p text:style-name="P1"><text:span text:style-name="Source_20_Text">Device Name: PC3</text:span></text:p>
      <text:p text:style-name="P1"><text:span text:style-name="Source_20_Text">IP Address: 192.168.1.12</text:span></text:p>
      <text:p text:style-name="P1"><text:span text:style-name="Source_20_Text">Subnet Mask: 255.255.255.0</text:span></text:p>
      <text:p text:style-name="P1"><text:span text:style-name="Source_20_Text">Default Gateway: 192.168.1.1</text:span></text:p>
      <text:p text:style-name="P1"><text:span text:style-name="Source_20_Text"/></text:p>
      <text:p text:style-name="P1"><text:span text:style-name="Source_20_Text">The same configuration structure was reused for all PCs. Only the device name and IP address were changed. This demonstrates the basic concept of network automation because repetitive configurations can be applied in a consistent and efficient 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8T11:38:27.184225381</meta:creation-date>
    <dc:date>2026-05-08T11:51:48.117428325</dc:date>
    <meta:editing-duration>PT2M58S</meta:editing-duration>
    <meta:editing-cycles>1</meta:editing-cycles>
    <meta:document-statistic meta:table-count="0" meta:image-count="0" meta:object-count="0" meta:page-count="1" meta:paragraph-count="16" meta:word-count="113" meta:character-count="771" meta:non-whitespace-character-count="674"/>
    <meta:generator>LibreOffice/24.2.7.2$Linux_X86_64 LibreOffice_project/420$Build-2</meta:generator>
  </office:meta>
</office:document-meta>
</file>